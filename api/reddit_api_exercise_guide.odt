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swiss" style:font-pitch="variable"/>
    <style:font-face style:name="Aptos1" svg:font-family="Aptos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7in" fo:margin-top="0in" fo:margin-bottom="0in" table:align="center" style:writing-mode="page"/>
    </style:style>
    <style:style style:name="Table1.A" style:family="table-column">
      <style:table-column-properties style:column-width="7in"/>
    </style:style>
    <style:style style:name="Table1.1" style:family="table-row">
      <style:table-row-properties style:min-row-height="0.1875in" fo:keep-together="auto"/>
    </style:style>
    <style:style style:name="Table1.A1" style:family="table-cell">
      <style:table-cell-properties fo:background-color="#f3f4f6" fo:padding-left="0.075in" fo:padding-right="0.075in" fo:padding-top="0in" fo:padding-bottom="0in" fo:border="0.75pt solid #e5e7eb">
        <style:background-image/>
      </style:table-cell-properties>
    </style:style>
    <style:style style:name="Table2" style:family="table">
      <style:table-properties style:width="7.15in" fo:margin-top="0in" fo:margin-bottom="0in" table:align="center" style:writing-mode="lr-tb"/>
    </style:style>
    <style:style style:name="Table2.A" style:family="table-column">
      <style:table-column-properties style:column-width="1.925in"/>
    </style:style>
    <style:style style:name="Table2.B" style:family="table-column">
      <style:table-column-properties style:column-width="3.284in"/>
    </style:style>
    <style:style style:name="Table2.C" style:family="table-column">
      <style:table-column-properties style:column-width="1.94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11827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="0.5pt solid #e5e7eb" style:writing-mode="lr-tb"/>
    </style:style>
    <style:style style:name="Table2.B2" style:family="table-cell">
      <style:table-cell-properties fo:padding-left="0.075in" fo:padding-right="0.075in" fo:padding-top="0in" fo:padding-bottom="0in" fo:border="0.5pt solid #e5e7eb" style:writing-mode="lr-tb"/>
    </style:style>
    <style:style style:name="Table2.C2" style:family="table-cell">
      <style:table-cell-properties fo:padding-left="0.075in" fo:padding-right="0.075in" fo:padding-top="0in" fo:padding-bottom="0in" fo:border="0.5pt solid #e5e7eb" style:writing-mode="lr-tb"/>
    </style:style>
    <style:style style:name="Table2.A3" style:family="table-cell">
      <style:table-cell-properties fo:padding-left="0.075in" fo:padding-right="0.075in" fo:padding-top="0in" fo:padding-bottom="0in" fo:border="0.5pt solid #e5e7eb" style:writing-mode="lr-tb"/>
    </style:style>
    <style:style style:name="Table2.B3" style:family="table-cell">
      <style:table-cell-properties fo:padding-left="0.075in" fo:padding-right="0.075in" fo:padding-top="0in" fo:padding-bottom="0in" fo:border="0.5pt solid #e5e7eb" style:writing-mode="lr-tb"/>
    </style:style>
    <style:style style:name="Table2.C3" style:family="table-cell">
      <style:table-cell-properties fo:padding-left="0.075in" fo:padding-right="0.075in" fo:padding-top="0in" fo:padding-bottom="0in" fo:border="0.5pt solid #e5e7eb" style:writing-mode="lr-tb"/>
    </style:style>
    <style:style style:name="Table2.A4" style:family="table-cell">
      <style:table-cell-properties fo:padding-left="0.075in" fo:padding-right="0.075in" fo:padding-top="0in" fo:padding-bottom="0in" fo:border="0.5pt solid #e5e7eb" style:writing-mode="lr-tb"/>
    </style:style>
    <style:style style:name="Table2.B4" style:family="table-cell">
      <style:table-cell-properties fo:padding-left="0.075in" fo:padding-right="0.075in" fo:padding-top="0in" fo:padding-bottom="0in" fo:border="0.5pt solid #e5e7eb" style:writing-mode="lr-tb"/>
    </style:style>
    <style:style style:name="Table2.C4" style:family="table-cell">
      <style:table-cell-properties fo:padding-left="0.075in" fo:padding-right="0.075in" fo:padding-top="0in" fo:padding-bottom="0in" fo:border="0.5pt solid #e5e7eb" style:writing-mode="lr-tb"/>
    </style:style>
    <style:style style:name="Table3" style:family="table">
      <style:table-properties style:width="7in" fo:margin-top="0in" fo:margin-bottom="0in" table:align="center" style:writing-mode="page"/>
    </style:style>
    <style:style style:name="Table3.A" style:family="table-column">
      <style:table-column-properties style:column-width="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3f4f6" fo:padding-left="0.075in" fo:padding-right="0.075in" fo:padding-top="0in" fo:padding-bottom="0in" fo:border="0.75pt solid #e5e7eb">
        <style:background-image/>
      </style:table-cell-properties>
    </style:style>
    <style:style style:name="Table4" style:family="table">
      <style:table-properties style:width="7in" fo:margin-top="0in" fo:margin-bottom="0in" table:align="center" style:writing-mode="page"/>
    </style:style>
    <style:style style:name="Table4.A" style:family="table-column">
      <style:table-column-properties style:column-width="7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3f4f6" fo:padding-left="0.075in" fo:padding-right="0.075in" fo:padding-top="0in" fo:padding-bottom="0in" fo:border="0.75pt solid #e5e7eb">
        <style:background-image/>
      </style:table-cell-properties>
    </style:style>
    <style:style style:name="Table5" style:family="table">
      <style:table-properties style:width="7in" fo:margin-top="0in" fo:margin-bottom="0in" table:align="center" style:writing-mode="page"/>
    </style:style>
    <style:style style:name="Table5.A" style:family="table-column">
      <style:table-column-properties style:column-width="7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3f4f6" fo:padding-left="0.075in" fo:padding-right="0.075in" fo:padding-top="0in" fo:padding-bottom="0in" fo:border="0.75pt solid #e5e7eb">
        <style:background-image/>
      </style:table-cell-properties>
    </style:style>
    <style:style style:name="Table6" style:family="table">
      <style:table-properties style:width="7in" fo:margin-top="0in" fo:margin-bottom="0in" table:align="center" style:writing-mode="page"/>
    </style:style>
    <style:style style:name="Table6.A" style:family="table-column">
      <style:table-column-properties style:column-width="7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ecfdf5" fo:padding-left="0.075in" fo:padding-right="0.075in" fo:padding-top="0in" fo:padding-bottom="0in" fo:border="1pt solid #d1d5db">
        <style:background-image/>
      </style:table-cell-properties>
    </style:style>
    <style:style style:name="Table7" style:family="table">
      <style:table-properties style:width="7in" fo:margin-top="0in" fo:margin-bottom="0in" table:align="center" style:writing-mode="page"/>
    </style:style>
    <style:style style:name="Table7.A" style:family="table-column">
      <style:table-column-properties style:column-width="7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3f4f6" fo:padding-left="0.075in" fo:padding-right="0.075in" fo:padding-top="0in" fo:padding-bottom="0in" fo:border="0.75pt solid #e5e7eb">
        <style:background-image/>
      </style:table-cell-properties>
    </style:style>
    <style:style style:name="Table8" style:family="table">
      <style:table-properties style:width="7in" fo:margin-top="0in" fo:margin-bottom="0in" table:align="center" style:writing-mode="lr-tb"/>
    </style:style>
    <style:style style:name="Table8.A" style:family="table-column">
      <style:table-column-properties style:column-width="3.5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111827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8.A2" style:family="table-cell">
      <style:table-cell-properties fo:padding-left="0.075in" fo:padding-right="0.075in" fo:padding-top="0in" fo:padding-bottom="0in" fo:border="0.5pt solid #000000" style:writing-mode="lr-tb"/>
    </style:style>
    <style:style style:name="Table8.B2" style:family="table-cell">
      <style:table-cell-properties fo:padding-left="0.075in" fo:padding-right="0.075in" fo:padding-top="0in" fo:padding-bottom="0in" fo:border="0.5pt solid #000000" style:writing-mode="lr-tb"/>
    </style:style>
    <style:style style:name="Table8.A3" style:family="table-cell">
      <style:table-cell-properties fo:padding-left="0.075in" fo:padding-right="0.075in" fo:padding-top="0in" fo:padding-bottom="0in" fo:border="0.5pt solid #000000" style:writing-mode="lr-tb"/>
    </style:style>
    <style:style style:name="Table8.B3" style:family="table-cell">
      <style:table-cell-properties fo:padding-left="0.075in" fo:padding-right="0.075in" fo:padding-top="0in" fo:padding-bottom="0in" fo:border="0.5pt solid #000000" style:writing-mode="lr-tb"/>
    </style:style>
    <style:style style:name="Table8.A4" style:family="table-cell">
      <style:table-cell-properties fo:padding-left="0.075in" fo:padding-right="0.075in" fo:padding-top="0in" fo:padding-bottom="0in" fo:border="0.5pt solid #000000" style:writing-mode="lr-tb"/>
    </style:style>
    <style:style style:name="Table8.B4" style:family="table-cell">
      <style:table-cell-properties fo:padding-left="0.075in" fo:padding-right="0.075in" fo:padding-top="0in" fo:padding-bottom="0in" fo:border="0.5pt solid #000000" style:writing-mode="lr-tb"/>
    </style:style>
    <style:style style:name="Table8.A5" style:family="table-cell">
      <style:table-cell-properties fo:padding-left="0.075in" fo:padding-right="0.075in" fo:padding-top="0in" fo:padding-bottom="0in" fo:border="0.5pt solid #000000" style:writing-mode="lr-tb"/>
    </style:style>
    <style:style style:name="Table8.B5" style:family="table-cell">
      <style:table-cell-properties fo:padding-left="0.075in" fo:padding-right="0.075in" fo:padding-top="0in" fo:padding-bottom="0in" fo:border="0.5pt solid #000000" style:writing-mode="lr-tb"/>
    </style:style>
    <style:style style:name="Table8.A6" style:family="table-cell">
      <style:table-cell-properties fo:padding-left="0.075in" fo:padding-right="0.075in" fo:padding-top="0in" fo:padding-bottom="0in" fo:border="0.5pt solid #000000" style:writing-mode="lr-tb"/>
    </style:style>
    <style:style style:name="Table8.B6" style:family="table-cell">
      <style:table-cell-properties fo:padding-left="0.075in" fo:padding-right="0.075in" fo:padding-top="0in" fo:padding-bottom="0in" fo:border="0.5pt solid #000000" style:writing-mode="lr-tb"/>
    </style:style>
    <style:style style:name="Table8.A7" style:family="table-cell">
      <style:table-cell-properties fo:padding-left="0.075in" fo:padding-right="0.075in" fo:padding-top="0in" fo:padding-bottom="0in" fo:border="0.5pt solid #000000" style:writing-mode="lr-tb"/>
    </style:style>
    <style:style style:name="Table8.B7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1.111in" fo:margin-bottom="0.139in" style:contextual-spacing="false" fo:text-align="center" style:justify-single-word="false"/>
    </style:style>
    <style:style style:name="P2" style:family="paragraph" style:parent-style-name="Heading_20_1">
      <style:paragraph-properties fo:margin-top="0in" fo:margin-bottom="0in" style:contextual-spacing="false" fo:break-before="page"/>
    </style:style>
    <style:style style:name="P3" style:family="paragraph" style:parent-style-name="Standard">
      <style:paragraph-properties fo:margin-top="0in" fo:margin-bottom="0.0835in" style:contextual-spacing="false" fo:line-height="100%"/>
    </style:style>
    <style:style style:name="P4" style:family="paragraph" style:parent-style-name="List_20_1" style:list-style-name="WWNum1">
      <style:paragraph-properties fo:margin-top="0in" fo:margin-bottom="0.0417in" style:contextual-spacing="true" fo:line-height="105%"/>
    </style:style>
    <style:style style:name="P5" style:family="paragraph" style:parent-style-name="Numbering_20_1" style:list-style-name="WWNum5">
      <style:paragraph-properties fo:margin-top="0in" fo:margin-bottom="0.0555in" style:contextual-spacing="true" fo:line-height="105%"/>
    </style:style>
    <style:style style:name="P6" style:family="paragraph" style:parent-style-name="Standard">
      <style:paragraph-properties fo:margin-top="0in" fo:margin-bottom="0.0555in" style:contextual-spacing="false"/>
    </style:style>
    <style:style style:name="P7" style:family="paragraph" style:parent-style-name="Standard">
      <style:paragraph-properties fo:margin-top="0in" fo:margin-bottom="0in" style:contextual-spacing="false" fo:line-height="100%" fo:text-align="left" style:justify-single-word="false" fo:orphans="2" fo:widows="2"/>
      <style:text-properties fo:language="en" fo:country="US" style:letter-kerning="false" style:language-asian="en" style:country-asian="US" style:font-name-complex="F" style:font-size-complex="11pt" style:language-complex="ar" style:country-complex="SA"/>
    </style:style>
    <style:style style:name="P8" style:family="paragraph" style:parent-style-name="Standard">
      <style:paragraph-properties fo:margin-top="0in" fo:margin-bottom="0.0835in" style:contextual-spacing="false"/>
    </style:style>
    <style:style style:name="P9" style:family="paragraph" style:parent-style-name="Standard">
      <style:paragraph-properties fo:margin-top="0in" fo:margin-bottom="0.0417in" style:contextual-spacing="false"/>
    </style:style>
    <style:style style:name="P10" style:family="paragraph" style:parent-style-name="Text_20_body">
      <style:paragraph-properties fo:margin-top="0in" fo:margin-bottom="0.028in" style:contextual-spacing="false" fo:line-height="110%"/>
    </style:style>
    <style:style style:name="T1" style:family="text">
      <style:text-properties fo:font-family="'Aptos Display'" style:font-family-generic="swiss" style:font-pitch="variable" fo:font-size="30pt" fo:font-weight="bold" style:font-size-asian="30pt" style:font-weight-asian="bold"/>
    </style:style>
    <style:style style:name="T2" style:family="text">
      <style:text-properties fo:color="#ffffff" loext:opacity="100%" fo:font-weight="bold" style:font-weight-asian="bold"/>
    </style:style>
    <style:style style:name="T3" style:family="text">
      <style:text-properties fo:font-family="'Courier New'" style:font-family-generic="swiss" style:font-pitch="variable" fo:font-size="8pt" style:font-name-asian="Courier New1" style:font-size-asian="8pt"/>
    </style:style>
    <style:style style:name="T4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ddit API Exercise Guide</text:span></text:p>
      <text:p text:style-name="Standard"/>
      <text:h text:style-name="P2" text:outline-level="1">1. What this exercise is testing</text:h>
      <text:p text:style-name="P3">The goal is to practice the workflow used in many software engineering tasks:</text:p>
      <text:list xml:id="list2063590770" text:style-name="WWNum1">
        <text:list-item>
          <text:p text:style-name="P4">Read documentation and identify the correct endpoint.</text:p>
        </text:list-item>
        <text:list-item>
          <text:p text:style-name="P4">Send an HTTP request from Python.</text:p>
        </text:list-item>
        <text:list-item>
          <text:p text:style-name="P4">Check whether the response succeeded before trusting it.</text:p>
        </text:list-item>
        <text:list-item>
          <text:p text:style-name="P4">Parse JSON safely.</text:p>
        </text:list-item>
        <text:list-item>
          <text:p text:style-name="P4">Use pagination when the API returns data page by page.</text:p>
        </text:list-item>
        <text:list-item>
          <text:p text:style-name="P4">Use recursion where the task explicitly asks for it.</text:p>
        </text:list-item>
        <text:list-item>
          <text:p text:style-name="P4">Sort and print results in the expected format.</text:p>
        </text:list-item>
      </text:list>
      <text:h text:style-name="Heading_20_1" text:outline-level="1">2. Setup before coding</text:h>
      <text:list xml:id="list830933978" text:style-name="WWNum5">
        <text:list-item>
          <text:p text:style-name="P5">Use a custom User-Agent header in every request.</text:p>
        </text:list-item>
        <text:list-item>
          <text:p text:style-name="P5">Use allow_redirects=False so invalid subreddits do not silently redirect.</text:p>
        </text:list-item>
        <text:list-item>
          <text:p text:style-name="P5">Test with a known subreddit first, for example Rwanda or programming.</text:p>
        </text:list-item>
      </text:list>
      <text:p text:style-name="Caption">Tiny test request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CodeBlock">import requests</text:p>
            <text:p text:style-name="CodeBlock"/>
            <text:p text:style-name="CodeBlock">HEADERS = {</text:p>
            <text:p text:style-name="CodeBlock">    "User-Agent": "linux:reddit_api_practice:v1.0 (by /u/your_username)"</text:p>
            <text:p text:style-name="CodeBlock">}</text:p>
            <text:p text:style-name="CodeBlock"/>
            <text:p text:style-name="CodeBlock">response = requests.get(</text:p>
            <text:p text:style-name="CodeBlock">    "https://www.reddit.com/r/python/about.json",</text:p>
            <text:p text:style-name="CodeBlock">    headers=HEADERS,</text:p>
            <text:p text:style-name="CodeBlock">    allow_redirects=False</text:p>
            <text:p text:style-name="CodeBlock">)</text:p>
            <text:p text:style-name="CodeBlock"/>
            <text:p text:style-name="CodeBlock">print(response.status_code)</text:p>
            <text:p text:style-name="CodeBlock">print(response.json().keys())</text:p>
          </table:table-cell>
        </table:table-row>
      </table:table>
      <text:p text:style-name="P6"/>
      <text:h text:style-name="Heading_20_1" text:outline-level="1">3. The endpoints you will use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><text:span text:style-name="T2">Use case</text:span></text:p>
          </table:table-cell>
          <table:table-cell table:style-name="Table2.A1" office:value-type="string">
            <text:p text:style-name="P7"><text:span text:style-name="T2">Endpoint path</text:span></text:p>
          </table:table-cell>
          <table:table-cell table:style-name="Table2.A1" office:value-type="string">
            <text:p text:style-name="P7"><text:span text:style-name="T2">What to look for</text:span></text:p>
          </table:table-cell>
        </table:table-row>
        <table:table-row table:style-name="Table2.1">
          <table:table-cell table:style-name="Table2.A2" office:value-type="string">
            <text:p text:style-name="P7">Subreddit info</text:p>
          </table:table-cell>
          <table:table-cell table:style-name="Table2.B2" office:value-type="string">
            <text:p text:style-name="P7"><text:span text:style-name="T3">/r/{subreddit}/about.json</text:span></text:p>
          </table:table-cell>
          <table:table-cell table:style-name="Table2.C2" office:value-type="string">
            <text:p text:style-name="P7">Read data about a subreddit, including subscriber count.</text:p>
          </table:table-cell>
        </table:table-row>
        <table:table-row table:style-name="Table2.1">
          <table:table-cell table:style-name="Table2.A3" office:value-type="string">
            <text:p text:style-name="P7">Hot posts</text:p>
          </table:table-cell>
          <table:table-cell table:style-name="Table2.B3" office:value-type="string">
            <text:p text:style-name="P7"><text:span text:style-name="T3">/r/{subreddit}/hot.json?limit=10</text:span></text:p>
          </table:table-cell>
          <table:table-cell table:style-name="Table2.C3" office:value-type="string">
            <text:p text:style-name="P7">Get the first page of hot posts.</text:p>
          </table:table-cell>
        </table:table-row>
        <table:table-row table:style-name="Table2.1">
          <table:table-cell table:style-name="Table2.A4" office:value-type="string">
            <text:p text:style-name="P7">Next hot posts page</text:p>
          </table:table-cell>
          <table:table-cell table:style-name="Table2.B4" office:value-type="string">
            <text:p text:style-name="P7"><text:span text:style-name="T3">/r/{subreddit}/hot.json?limit=100&amp;after=&lt;token&gt;</text:span></text:p>
          </table:table-cell>
          <table:table-cell table:style-name="Table2.C4" office:value-type="string">
            <text:p text:style-name="P7">Use the after value from the previous response to paginate.</text:p>
          </table:table-cell>
        </table:table-row>
      </table:table>
      <text:p text:style-name="P8"/>
      <text:h text:style-name="Heading_20_1" text:outline-level="1"><text:soft-page-break/>4. Understanding the JSON shape</text:h>
      <text:p text:style-name="P3">For hot posts, Reddit returns a listing. The titles are nested inside data -&gt; children -&gt; each post -&gt; data -&gt; title.</text:p>
      <text:p text:style-name="Caption">Simplified Reddit listing response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CodeBlock">{</text:p>
            <text:p text:style-name="CodeBlock"><text:s text:c="2"/>"kind": "Listing",</text:p>
            <text:p text:style-name="CodeBlock"><text:s text:c="2"/>"data": {</text:p>
            <text:p text:style-name="CodeBlock">    "after": "t3_example_next_page_token",</text:p>
            <text:p text:style-name="CodeBlock">    "children": [</text:p>
            <text:p text:style-name="CodeBlock">     <text:s/>{</text:p>
            <text:p text:style-name="CodeBlock">        "kind": "t3",</text:p>
            <text:p text:style-name="CodeBlock">        "data": {</text:p>
            <text:p text:style-name="CodeBlock">         <text:s/>"title": "Example post title",</text:p>
            <text:p text:style-name="CodeBlock">         <text:s/>"subreddit": "python"</text:p>
            <text:p text:style-name="CodeBlock">        }</text:p>
            <text:p text:style-name="CodeBlock">     <text:s/>}</text:p>
            <text:p text:style-name="CodeBlock">    ]</text:p>
            <text:p text:style-name="CodeBlock"><text:s text:c="2"/>}</text:p>
            <text:p text:style-name="CodeBlock">}</text:p>
          </table:table-cell>
        </table:table-row>
      </table:table>
      <text:p text:style-name="P9"/>
      <text:list text:continue-list="list2063590770" text:style-name="WWNum1">
        <text:list-item>
          <text:p text:style-name="P4">data['children'] is the list of posts on the current page.</text:p>
        </text:list-item>
        <text:list-item>
          <text:p text:style-name="P4">data['after'] is the token for the next page.</text:p>
        </text:list-item>
        <text:list-item>
          <text:p text:style-name="P4">When after is None, there are no more pages to fetch.</text:p>
        </text:list-item>
      </text:list>
      <text:h text:style-name="Heading_20_1" text:outline-level="1">5. Task 0 - Number of subscribers</text:h>
      <text:p text:style-name="P3">Goal: write a function that returns the number of subscribers for a given subreddit. If the subreddit is invalid, return 0.</text:p>
      <text:list text:continue-numbering="true" text:style-name="WWNum1">
        <text:list-item>
          <text:p text:style-name="P4">Endpoint: https://www.reddit.com/r/{subreddit}/about.json</text:p>
        </text:list-item>
        <text:list-item>
          <text:p text:style-name="P4">Look inside response.json()['data']['subscribers'].</text:p>
        </text:list-item>
        <text:list-item>
          <text:p text:style-name="P4">Check status_code before reading the JSON.</text:p>
        </text:list-item>
      </text:list>
      <text:p text:style-name="Caption">Example solution structure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CodeBlock">#!/usr/bin/python3</text:p>
            <text:p text:style-name="CodeBlock">"""Query Reddit API for subreddit subscriber count."""</text:p>
            <text:p text:style-name="CodeBlock">import requests</text:p>
            <text:p text:style-name="CodeBlock"/>
            <text:p text:style-name="CodeBlock"/>
            <text:p text:style-name="CodeBlock">HEADERS = {</text:p>
            <text:p text:style-name="CodeBlock">    "User-Agent": "linux:reddit_api_practice:v1.0 (by /u/your_username)"</text:p>
            <text:p text:style-name="CodeBlock">}</text:p>
            <text:p text:style-name="CodeBlock"/>
            <text:p text:style-name="CodeBlock"/>
            <text:p text:style-name="CodeBlock">def number_of_subscribers(subreddit):</text:p>
            <text:p text:style-name="CodeBlock">    """Return the number of subscribers for a subreddit, or 0 if invalid."""</text:p>
            <text:p text:style-name="CodeBlock">    url = f"https://www.reddit.com/r/{subreddit}/about.json"</text:p>
            <text:p text:style-name="CodeBlock"/>
            <text:p text:style-name="CodeBlock">    response = requests.get(url, headers=HEADERS, allow_redirects=False)</text:p>
            <text:p text:style-name="CodeBlock"/>
            <text:p text:style-name="CodeBlock">    if response.status_code != 200:</text:p>
            <text:p text:style-name="CodeBlock">        return 0</text:p>
            <text:p text:style-name="CodeBlock"/>
            <text:p text:style-name="CodeBlock">    data = response.json().get("data", {})</text:p>
            <text:p text:style-name="CodeBlock">    return data.get("subscribers", 0)</text:p>
          </table:table-cell>
        </table:table-row>
      </table:table>
      <text:p text:style-name="P6"/>
      <text:h text:style-name="Heading_20_1" text:outline-level="1"><text:soft-page-break/>6. Task 1 - Print the top 10 hot posts</text:h>
      <text:p text:style-name="P3">Goal: print the titles of the first 10 hot posts for a subreddit. If the subreddit is invalid, print None.</text:p>
      <text:list text:continue-numbering="true" text:style-name="WWNum1">
        <text:list-item>
          <text:p text:style-name="P4">Endpoint: /r/{subreddit}/hot.json?limit=10</text:p>
        </text:list-item>
        <text:list-item>
          <text:p text:style-name="P4">The response contains a list of posts in data -&gt; children.</text:p>
        </text:list-item>
        <text:list-item>
          <text:p text:style-name="P4">Each title is in post['data']['title'].</text:p>
        </text:list-item>
      </text:list>
      <text:h text:style-name="Heading_20_1" text:outline-level="1">7. Pagination and recursion</text:h>
      <text:p text:style-name="P3">APIs often do not return everything at once. Reddit returns a page of posts and gives you an after token for the next page.</text:p>
      <text:list text:continue-list="list830933978" text:style-name="WWNum5">
        <text:list-item>
          <text:p text:style-name="P5">Call hot.json for the first page.</text:p>
        </text:list-item>
        <text:list-item>
          <text:p text:style-name="P5">Read the post titles from data['children'].</text:p>
        </text:list-item>
        <text:list-item>
          <text:p text:style-name="P5">Read data['after'].</text:p>
        </text:list-item>
        <text:list-item>
          <text:p text:style-name="P5">If after is not None, call the same function again with after.</text:p>
        </text:list-item>
        <text:list-item>
          <text:p text:style-name="P5">If after is None, return the final list.</text:p>
        </text:list-item>
      </text:list>
      <text:p text:style-name="Caption">Recursion idea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CodeBlock">def example_recursive_page(after=None):</text:p>
            <text:p text:style-name="CodeBlock">    # 1. Request one page using after</text:p>
            <text:p text:style-name="CodeBlock">    # 2. Add results from this page</text:p>
            <text:p text:style-name="CodeBlock">    # 3. If there is another page, call yourself again</text:p>
            <text:p text:style-name="CodeBlock">    # 4. Otherwise, return final result</text:p>
            <text:p text:style-name="CodeBlock">    pass</text:p>
          </table:table-cell>
        </table:table-row>
      </table:table>
      <text:p text:style-name="P9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"><text:span text:style-name="T4">Think of recursion like this</text:span><text:line-break/>A recursive function solves one small part, then calls itself for the next small part. In this exercise, one call handles one Reddit page.</text:p>
          </table:table-cell>
        </table:table-row>
      </table:table>
      <text:p text:style-name="P6"/>
      <text:h text:style-name="Heading_20_1" text:outline-level="1">8. Task 2 - Recursively collect hot post titles</text:h>
      <text:p text:style-name="P3">Goal: return a list containing the titles of all hot posts for a subreddit. If the subreddit is invalid, return None. The important part is that pagination should be recursive.</text:p>
      <text:p text:style-name="Caption">Example solution structure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CodeBlock">#!/usr/bin/python3</text:p>
            <text:p text:style-name="CodeBlock">"""Recursively fetch hot post titles for a subreddit."""</text:p>
            <text:p text:style-name="CodeBlock">import requests</text:p>
            <text:p text:style-name="CodeBlock"/>
            <text:p text:style-name="CodeBlock"/>
            <text:p text:style-name="CodeBlock">HEADERS = {</text:p>
            <text:p text:style-name="CodeBlock">    "User-Agent": "linux:reddit_api_practice:v1.0 (by /u/your_username)"</text:p>
            <text:p text:style-name="CodeBlock">}</text:p>
            <text:p text:style-name="CodeBlock"/>
            <text:p text:style-name="CodeBlock"/>
            <text:p text:style-name="CodeBlock">def recurse(subreddit, hot_list=[], after=None):</text:p>
            <text:p text:style-name="CodeBlock">    """Return a list of all hot post titles for a subreddit, or None."""</text:p>
            <text:p text:style-name="CodeBlock">    url = f"https://www.reddit.com/r/{subreddit}/hot.json"</text:p>
            <text:p text:style-name="CodeBlock">    params = {"limit": 100}</text:p>
            <text:p text:style-name="CodeBlock"/>
            <text:p text:style-name="CodeBlock">    if after is not None:</text:p>
            <text:p text:style-name="CodeBlock">        params["after"] = after</text:p>
            <text:p text:style-name="CodeBlock"/>
            <text:p text:style-name="CodeBlock">    response = requests.get(</text:p>
            <text:p text:style-name="CodeBlock"><text:soft-page-break/>        url,</text:p>
            <text:p text:style-name="CodeBlock">        headers=HEADERS,</text:p>
            <text:p text:style-name="CodeBlock">        params=params,</text:p>
            <text:p text:style-name="CodeBlock">        allow_redirects=False</text:p>
            <text:p text:style-name="CodeBlock">    )</text:p>
            <text:p text:style-name="CodeBlock"/>
            <text:p text:style-name="CodeBlock">    if response.status_code != 200:</text:p>
            <text:p text:style-name="CodeBlock">        return None</text:p>
            <text:p text:style-name="CodeBlock"/>
            <text:p text:style-name="CodeBlock">    data = response.json().get("data", {})</text:p>
            <text:p text:style-name="CodeBlock">    posts = data.get("children", [])</text:p>
            <text:p text:style-name="CodeBlock"/>
            <text:p text:style-name="CodeBlock">    for post in posts:</text:p>
            <text:p text:style-name="CodeBlock">        title = post.get("data", {}).get("title")</text:p>
            <text:p text:style-name="CodeBlock">        if title is not None:</text:p>
            <text:p text:style-name="CodeBlock">            hot_list.append(title)</text:p>
            <text:p text:style-name="CodeBlock"/>
            <text:p text:style-name="CodeBlock">    after = data.get("after")</text:p>
            <text:p text:style-name="CodeBlock"/>
            <text:p text:style-name="CodeBlock">    if after is None:</text:p>
            <text:p text:style-name="CodeBlock">        return hot_list</text:p>
            <text:p text:style-name="CodeBlock"/>
            <text:p text:style-name="CodeBlock">    return recurse(subreddit, hot_list, after)</text:p>
          </table:table-cell>
        </table:table-row>
      </table:table>
      <text:p text:style-name="P6"/>
      <text:h text:style-name="Heading_20_1" text:outline-level="1">9. Debugging checklist</text:h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7"><text:span text:style-name="T2">Habit</text:span></text:p>
          </table:table-cell>
          <table:table-cell table:style-name="Table8.A1" office:value-type="string">
            <text:p text:style-name="P7"><text:span text:style-name="T2">Why it matters</text:span></text:p>
          </table:table-cell>
        </table:table-row>
        <table:table-row table:style-name="Table8.1">
          <table:table-cell table:style-name="Table8.A2" office:value-type="string">
            <text:p text:style-name="P7">Custom User-Agent header</text:p>
          </table:table-cell>
          <table:table-cell table:style-name="Table8.B2" office:value-type="string">
            <text:p text:style-name="P7">Prevents default Python headers and helps with Reddit API limits.</text:p>
          </table:table-cell>
        </table:table-row>
        <table:table-row table:style-name="Table8.1">
          <table:table-cell table:style-name="Table8.A3" office:value-type="string">
            <text:p text:style-name="P7">allow_redirects=False</text:p>
          </table:table-cell>
          <table:table-cell table:style-name="Table8.B3" office:value-type="string">
            <text:p text:style-name="P7">Invalid subreddit names can redirect instead of returning clean JSON.</text:p>
          </table:table-cell>
        </table:table-row>
        <table:table-row table:style-name="Table8.1">
          <table:table-cell table:style-name="Table8.A4" office:value-type="string">
            <text:p text:style-name="P7">Check status_code</text:p>
          </table:table-cell>
          <table:table-cell table:style-name="Table8.B4" office:value-type="string">
            <text:p text:style-name="P7">Do not call .json() blindly if the response is 404, 403, or 429.</text:p>
          </table:table-cell>
        </table:table-row>
        <table:table-row table:style-name="Table8.1">
          <table:table-cell table:style-name="Table8.A5" office:value-type="string">
            <text:p text:style-name="P7">Use .get() for nested JSON</text:p>
          </table:table-cell>
          <table:table-cell table:style-name="Table8.B5" office:value-type="string">
            <text:p text:style-name="P7">Avoid KeyError while learning.</text:p>
          </table:table-cell>
        </table:table-row>
        <table:table-row table:style-name="Table8.1">
          <table:table-cell table:style-name="Table8.A6" office:value-type="string">
            <text:p text:style-name="P7">Use recursion for pagination</text:p>
          </table:table-cell>
          <table:table-cell table:style-name="Table8.B6" office:value-type="string">
            <text:p text:style-name="P7">For the recursive tasks, one API page should call the next page.</text:p>
          </table:table-cell>
        </table:table-row>
        <table:table-row table:style-name="Table8.1">
          <table:table-cell table:style-name="Table8.A7" office:value-type="string">
            <text:p text:style-name="P7">Sort at the end</text:p>
          </table:table-cell>
          <table:table-cell table:style-name="Table8.B7" office:value-type="string">
            <text:p text:style-name="P7">Do not print keyword counts until all pages have been counted.</text:p>
          </table:table-cell>
        </table:table-row>
      </table:table>
      <text:p text:style-name="P8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swiss" style:font-pitch="variable"/>
    <style:font-face style:name="Aptos1" svg:font-family="Aptos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left" style:justify-single-word="false" fo:orphans="2" fo:widows="2" style:writing-mode="lr-tb"/>
      <style:text-properties fo:color="#111827" loext:opacity="100%" style:font-name="Aptos" fo:font-family="Aptos" style:font-family-generic="swiss" style:font-pitch="variable" fo:font-size="10.5pt" style:font-name-asian="Aptos1" style:font-family-asian="Aptos" style:font-family-generic-asian="system" style:font-pitch-asian="variable" style:font-size-asian="10.5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b5563" loext:opacity="100%" fo:font-size="8.5pt" fo:font-style="italic" fo:font-weight="bold" style:font-size-asian="8.5pt" style:font-style-asian="italic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0f172a" loext:opacity="100%" style:font-name="Calibri1" fo:font-family="Calibri" style:font-family-generic="swiss" style:font-pitch="variable" fo:font-size="19pt" fo:font-weight="bold" style:font-name-asian="ＭＳ ゴシック" style:font-family-asian="'ＭＳ ゴシック'" style:font-family-generic-asian="system" style:font-pitch-asian="variable" style:font-size-asian="19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1f2937" loext:opacity="100%" style:font-name="Calibri1" fo:font-family="Calibri" style:font-family-generic="swiss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374151" loext:opacity="100%" style:font-name="Calibri1" fo:font-family="Calibri" style:font-family-generic="swiss" style:font-pitch="variable" fo:font-size="11.5pt" fo:font-weight="bold" style:font-name-asian="ＭＳ ゴシック" style:font-family-asian="'ＭＳ ゴシック'" style:font-family-generic-asian="system" style:font-pitch-asian="variable" style:font-size-asian="11.5pt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1" fo:font-family="Calibri" style:font-family-generic="swiss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1" fo:font-family="Calibri" style:font-family-generic="swiss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1" fo:font-family="Calibri" style:font-family-generic="swiss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1" fo:font-family="Calibri" style:font-family-generic="swiss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1" fo:font-family="Calibri" style:font-family-generic="swiss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1" fo:font-family="Calibri" style:font-family-generic="swiss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lef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1" fo:font-family="Calibri" style:font-family-generic="swiss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1" fo:font-family="Calibri" style:font-family-generic="swiss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lef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CodeBlock" style:family="paragraph">
      <style:paragraph-properties fo:margin-left="0.05in" fo:margin-right="0.05in" fo:margin-top="0in" fo:margin-bottom="0in" style:contextual-spacing="false" fo:line-height="100%" fo:text-align="left" style:justify-single-word="false" fo:orphans="2" fo:widows="2" style:writing-mode="lr-tb"/>
      <style:text-properties fo:color="#111827" loext:opacity="100%" style:font-name="Courier New" fo:font-family="'Courier New'" style:font-family-generic="roman" style:font-pitch="variable" fo:font-size="7.5pt" style:font-name-asian="Courier New1" style:font-family-asian="'Courier New'" style:font-family-generic-asian="system" style:font-pitch-asian="variable" style:font-size-asian="7.5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>
      <style:text-properties style:font-name="Cambria" fo:font-family="Cambria" style:font-family-generic="roman" style:font-pitch="variable"/>
    </style:style>
    <style:style style:name="ListLabel_20_2" style:display-name="ListLabel 2" style:family="text">
      <style:text-properties style:font-name="Cambria" fo:font-family="Cambria" style:font-family-generic="roman" style:font-pitch="variable"/>
    </style:style>
    <style:style style:name="ListLabel_20_3" style:display-name="ListLabel 3" style:family="text">
      <style:text-properties style:font-name="Cambria" fo:font-family="Cambria" style:font-family-generic="roman" style:font-pitch="variable"/>
    </style:style>
    <style:style style:name="ListLabel_20_4" style:display-name="ListLabel 4" style:family="text">
      <style:text-properties style:font-name="Cambria" fo:font-family="Cambria" style:font-family-generic="roman" style:font-pitch="variable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right" style:justify-single-word="false"/>
    </style:style>
    <style:style style:name="MT1" style:family="text">
      <style:text-properties fo:color="#6b7280" loext:opacity="100%" fo:font-size="8pt" style:font-size-asian="8pt"/>
    </style:style>
    <style:page-layout style:name="Mpm1">
      <style:page-layout-properties fo:page-width="8.5in" fo:page-height="11in" style:num-format="1" style:print-orientation="portrait" fo:margin-top="0.5in" fo:margin-bottom="0.65in" fo:margin-left="0.75in" fo:margin-right="0.7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in" fo:margin-left="0in" fo:margin-right="0in" fo:margin-bottom="0.11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Reddit API Exercise Guide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4</meta:editing-cycles>
    <meta:creation-date>2013-12-23T23:15:00</meta:creation-date>
    <dc:date>2026-06-23T15:15:03.010056661</dc:date>
    <meta:editing-duration>PT4H14M40S</meta:editing-duration>
    <meta:generator>LibreOffice/26.2.3.2$Linux_X86_64 LibreOffice_project/620$Build-2</meta:generator>
    <meta:document-statistic meta:table-count="8" meta:image-count="0" meta:object-count="0" meta:page-count="5" meta:paragraph-count="149" meta:word-count="788" meta:character-count="5550" meta:non-whitespace-character-count="4649"/>
    <meta:user-defined meta:name="AppVersion">16.0000</meta:user-defined>
    <meta:template xlink:type="simple" xlink:actuate="onRequest" xlink:title="Normal" xlink:href=""/>
  </office:meta>
</office:document-meta>
</file>